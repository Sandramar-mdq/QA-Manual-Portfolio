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7.179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8.356cm"/>
    </style:style>
    <style:style style:name="co6" style:family="table-column">
      <style:table-column-properties fo:break-before="auto" style:column-width="8.872cm"/>
    </style:style>
    <style:style style:name="co7" style:family="table-column">
      <style:table-column-properties fo:break-before="auto" style:column-width="3.277cm"/>
    </style:style>
    <style:style style:name="co8" style:family="table-column">
      <style:table-column-properties fo:break-before="auto" style:column-width="3.895cm"/>
    </style:style>
    <style:style style:name="co9" style:family="table-column">
      <style:table-column-properties fo:break-before="auto" style:column-width="5.754cm"/>
    </style:style>
    <style:style style:name="co10" style:family="table-column">
      <style:table-column-properties fo:break-before="auto" style:column-width="7.535cm"/>
    </style:style>
    <style:style style:name="co11" style:family="table-column">
      <style:table-column-properties fo:break-before="auto" style:column-width="3.064cm"/>
    </style:style>
    <style:style style:name="co12" style:family="table-column">
      <style:table-column-properties fo:break-before="auto" style:column-width="6.983cm"/>
    </style:style>
    <style:style style:name="co13" style:family="table-column">
      <style:table-column-properties fo:break-before="auto" style:column-width="9.363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2.558cm" fo:break-before="auto" style:use-optimal-row-height="true"/>
    </style:style>
    <style:style style:name="ro3" style:family="table-row">
      <style:table-row-properties style:row-height="3.51cm" fo:break-before="auto" style:use-optimal-row-height="true"/>
    </style:style>
    <style:style style:name="ro4" style:family="table-row">
      <style:table-row-properties style:row-height="4.939cm" fo:break-before="auto" style:use-optimal-row-height="true"/>
    </style:style>
    <style:style style:name="ro5" style:family="table-row">
      <style:table-row-properties style:row-height="4.463cm" fo:break-before="auto" style:use-optimal-row-height="true"/>
    </style:style>
    <style:style style:name="ro6" style:family="table-row">
      <style:table-row-properties style:row-height="5.415cm" fo:break-before="auto" style:use-optimal-row-height="true"/>
    </style:style>
    <style:style style:name="ro7" style:family="table-row">
      <style:table-row-properties style:row-height="3.034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094cm" fo:break-before="auto" style:use-optimal-row-height="true"/>
    </style:style>
    <style:style style:name="ro10" style:family="table-row">
      <style:table-row-properties style:row-height="3.986cm" fo:break-before="auto" style:use-optimal-row-height="true"/>
    </style:style>
    <style:style style:name="ro11" style:family="table-row">
      <style:table-row-properties style:row-height="2.905cm" fo:break-before="auto" style:use-optimal-row-height="true"/>
    </style:style>
    <style:style style:name="ro12" style:family="table-row">
      <style:table-row-properties style:row-height="5.891cm" fo:break-before="auto" style:use-optimal-row-height="true"/>
    </style:style>
    <style:style style:name="ro13" style:family="table-row">
      <style:table-row-properties style:row-height="7.32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text-align-source="fix" style:repeat-content="false" fo:wrap-option="wrap" fo:border="0.74pt solid #000000" fo:padding="0.101cm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 fo:padding="0.101cm"/>
      <style:text-properties fo:font-size="12pt" style:font-size-asian="10pt" style:font-size-complex="10pt"/>
    </style:style>
    <style:style style:name="ce3" style:family="table-cell" style:parent-style-name="Default">
      <style:table-cell-properties fo:wrap-option="wrap" fo:padding="0.101cm"/>
      <style:text-properties fo:font-size="12pt" style:font-size-asian="10pt" style:font-size-complex="10pt"/>
    </style:style>
    <style:style style:name="ce7" style:family="table-cell" style:parent-style-name="Default">
      <style:text-properties fo:font-size="12pt" style:font-size-asian="10pt" style:font-size-complex="10pt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81">
      <style:table-cell-properties fo:wrap-option="wrap" fo:border="0.74pt solid #000000" fo:padding="0.101cm"/>
      <style:text-properties fo:font-size="12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fo:border="0.74pt solid #000000" fo:padding="0.101cm"/>
      <style:paragraph-properties fo:text-align="center" fo:margin-left="0cm"/>
      <style:text-properties fo:font-size="12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74pt solid #000000" fo:padding="0.101cm"/>
      <style:paragraph-properties fo:text-align="center" fo:margin-left="0cm"/>
      <style:text-properties fo:font-size="20pt" style:font-size-asian="10pt" style:font-size-complex="10pt"/>
    </style:style>
    <style:style style:name="T1" style:family="text">
      <style:text-properties fo:language="es" fo:country="A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m_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1" table:number-columns-repeated="16377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ódulo</text:p>
          </table:table-cell>
          <table:table-cell table:style-name="ce8" office:value-type="string" calcext:value-type="string">
            <text:p>Caso de prueba</text:p>
          </table:table-cell>
          <table:table-cell table:style-name="ce8" office:value-type="string" calcext:value-type="string">
            <text:p>Precondiciones</text:p>
          </table:table-cell>
          <table:table-cell table:style-name="ce8" office:value-type="string" calcext:value-type="string">
            <text:p>Pasos</text:p>
          </table:table-cell>
          <table:table-cell table:style-name="ce8" office:value-type="string" calcext:value-type="string">
            <text:p>Resultado esperado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2">
          <table:table-cell table:style-name="ce9" office:value-type="string" calcext:value-type="string">
            <text:p>REG_01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obligatoriedad del nombre de usuario</text:p>
          </table:table-cell>
          <table:table-cell table:style-name="ce9" office:value-type="string" calcext:value-type="string">
            <text:p>- La app debe estar activa </text:p>
            <text:p>- el usuario pueda acceder a la pagina de registro </text:p>
            <text:p>- El nombre de <text:span text:style-name="T1">usuario</text:span> no esta registrado previamente</text:p>
          </table:table-cell>
          <table:table-cell table:style-name="ce9" office:value-type="string" calcext:value-type="string">
            <text:p>1. ingresar ala pagina de registro, </text:p>
            <text:p>2. no <text:span text:style-name="T1">completar</text:span> el nombre de <text:span text:style-name="T1">usuario</text:span>, </text:p>
            <text:p>3. completar todos los otros campos del registro, </text:p>
            <text:p>4. hacer clic en el <text:span text:style-name="T1">botón</text:span> "registrarse" </text:p>
          </table:table-cell>
          <table:table-cell table:style-name="ce9" office:value-type="string" calcext:value-type="string">
            <text:p>- El sistema muestra un mensaje <text:span text:style-name="T1">advirtiendo</text:span> que no se completó el campo <text:span text:style-name="T1">correspondiente</text:span> al nombre de usuario, e invita a completarlo para finalizar el registro 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3">
          <table:table-cell table:style-name="ce9" office:value-type="string" calcext:value-type="string">
            <text:p>REG_02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registro de usuario con <text:span text:style-name="T1">email</text:span> invalido</text:p>
          </table:table-cell>
          <table:table-cell table:style-name="ce9" office:value-type="string" calcext:value-type="string">
            <text:p><text:span text:style-name="T2">- a app debe estar activa </text:span></text:p>
            <text:p>- El usuario puede acceder a la pagina de registro  </text:p>
            <text:p>- El <text:span text:style-name="T1">email</text:span> ingresado no esta registrado aun </text:p>
          </table:table-cell>
          <table:table-cell table:style-name="ce9" office:value-type="string" calcext:value-type="string">
            <text:p>1.Acceder a la página de registro.  </text:p>
            <text:p>2.Completar correctamente todos los campos obligatorios excepto el email.  </text:p>
            <text:p>3.Ingresar en el campo “Email” un valor con formato inválido (por ejemplo, sin @ o sin dominio).  </text:p>
            <text:p>4.Hacer clic en el botón “Registrarse”.</text:p>
          </table:table-cell>
          <table:table-cell table:style-name="ce9" office:value-type="string" calcext:value-type="string">
            <text:p>- El sistema muestra un mensaje indicando que el formato del email no es válido.</text:p>
            <text:p>- El mensaje de error incluye un ejemplo o indicación del formato de email esperado.</text:p>
            <text:p>- El sistema no permite enviar el formulario de registro mientras el email tenga formato inválido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3">
          <table:table-cell table:style-name="ce9" office:value-type="string" calcext:value-type="string">
            <text:p>REG_03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registro de usuario con <text:span text:style-name="T1">email</text:span> repetido</text:p>
          </table:table-cell>
          <table:table-cell table:style-name="ce9" office:value-type="string" calcext:value-type="string">
            <text:p><text:span text:style-name="T2">- a app debe estar activa </text:span></text:p>
            <text:p>- el usuario puede acceder a la pagina de registro  </text:p>
            <text:p>- El email ingresado ya esta registrado.</text:p>
          </table:table-cell>
          <table:table-cell table:style-name="ce9" office:value-type="string" calcext:value-type="string">
            <text:p><text:span text:style-name="T2">1.Acceder a la página de registro.  </text:span></text:p>
            <text:p><text:span text:style-name="T2">2.Completar correctamente todos los campos obligatorios excepto el email.  </text:span></text:p>
            <text:p><text:span text:style-name="T2">3.Ingresar en el campo “Email”, una dirección de correo electrónico que ya esté registrada en el sistema.</text:span></text:p>
            <text:p><text:span text:style-name="T2">4.Hacer clic en el botón “Registrarse”.</text:span></text:p>
          </table:table-cell>
          <table:table-cell table:style-name="ce9" office:value-type="string" calcext:value-type="string">
            <text:p>- Al presionar el <text:span text:style-name="T1">botón</text:span> “Registrarse”, aparece un mensaje advirtiendo que ese correo electrónico ya está registrado y no permite continuar el registro. </text:p>
            <text:p/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4">
          <table:table-cell table:style-name="ce9" office:value-type="string" calcext:value-type="string">
            <text:p>REG_04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registro de usuario con contraseña corta</text:p>
          </table:table-cell>
          <table:table-cell table:style-name="ce9" office:value-type="string" calcext:value-type="string">
            <text:p>- a app debe estar activa  </text:p>
            <text:p>- el usuario puede acceder a la pagina de registro  </text:p>
            <text:p>- el campo "contraseña", debe tener restricciones al menos de tamaño (Por ej: no menos de 8 caracteres/signos y no más de 15 caracteres/signos)</text:p>
            <text:p/>
          </table:table-cell>
          <table:table-cell table:style-name="ce9" office:value-type="string" calcext:value-type="string">
            <text:p>1.Acceder a la página de registro.   2.Completar correctamente todos los campos obligatorios excepto la “Contraseña”.</text:p>
            <text:p>3.Ingresar en el campo “Contraseña”, una contraseña de menos de 8 caracteres/signos.</text:p>
          </table:table-cell>
          <table:table-cell table:style-name="ce9" office:value-type="string" calcext:value-type="string">
            <text:p><text:span text:style-name="T2">- Debajo del campo se debe visualizar un texto explicativo sobre los requisitos para generar una contraseña correcta.</text:span></text:p>
            <text:p>- Una vez completado el campo Contraseña con menos de 8 caracteres/signos, el sistema muestra un mensaje indicando que la contraseña no cumple con la cantidad mínima de caracteres.  </text:p>
            <text:p>- El registro no puede completarse hasta corregir el valor ingresado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5">
          <table:table-cell table:style-name="ce9" office:value-type="string" calcext:value-type="string">
            <text:p>REG_05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registro de usuario con contraseña con espacios en blanco</text:p>
          </table:table-cell>
          <table:table-cell table:style-name="ce9" office:value-type="string" calcext:value-type="string">
            <text:p>- a app debe estar activa   </text:p>
            <text:p>- el usuario puede acceder a la pagina de registro   </text:p>
            <text:p>- el campo "contraseña", debe tener restricciones al menos de espacios en blanco. </text:p>
            <text:p/>
          </table:table-cell>
          <table:table-cell table:style-name="ce9" office:value-type="string" calcext:value-type="string">
            <text:p>1.Acceder a la página de registro.   </text:p>
            <text:p>2.Completar correctamente todos los campos obligatorios excepto la “Contraseña”. </text:p>
            <text:p>3.Ingresar en el campo “Contraseña”, una contraseña con espacios en blanco.</text:p>
          </table:table-cell>
          <table:table-cell table:style-name="ce9" office:value-type="string" calcext:value-type="string">
            <text:p><text:span text:style-name="T2">- Debajo del campo se debe visualizar un texto explicativo sobre los requisitos para generar una contraseña correcta.</text:span></text:p>
            <text:p>- Una vez completado el campo Contraseña con al menos un espacio en blanco, el sistema muestra un mensaje indicando que la contraseña contiene espacios en blanco.</text:p>
            <text:p>-  El registro no puede completarse hasta corregir el valor ingresado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6">
          <table:table-cell table:style-name="ce9" office:value-type="string" calcext:value-type="string">
            <text:p>REG_06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registro de usuario con contraseña y confirmación de contraseña que no coinciden</text:p>
          </table:table-cell>
          <table:table-cell table:style-name="ce9" office:value-type="string" calcext:value-type="string">
            <text:p>- La app debe estar activa  </text:p>
            <text:p>- el usuario pueda acceder a la pagina de registro </text:p>
          </table:table-cell>
          <table:table-cell table:style-name="ce9" office:value-type="string" calcext:value-type="string">
            <text:p>1.Acceder a la página de registro.    </text:p>
            <text:p>2.Completar correctamente todos los campos obligatorios excepto la “Contraseña”.  </text:p>
            <text:p>3.Ingresar en el campo “Contraseña”, una contraseña que cumpla con los requerimientos del sistema.</text:p>
            <text:p>4. Ingresar en el campo “Confirmación de contraseña”,una contraseña que no sea exactamente igual a la ingresada en el campo anterior.</text:p>
          </table:table-cell>
          <table:table-cell table:style-name="ce9" office:value-type="string" calcext:value-type="string">
            <text:p>- El sistema muestra un mensaje indicando que las contraseñas no coinciden.</text:p>
            <text:p>- El registro no puede continuarse hasta ingresar en ambos campos  contraseñas idénticas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7">
          <table:table-cell table:style-name="ce9" office:value-type="string" calcext:value-type="string">
            <text:p>REG_07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comportamiento del botón “Registrase”, cuando todos los campos del formulario están en blanco.</text:p>
          </table:table-cell>
          <table:table-cell table:style-name="ce9" office:value-type="string" calcext:value-type="string">
            <text:p>- La app debe estar activa  </text:p>
            <text:p>- el usuario pueda acceder a la pagina de registro </text:p>
          </table:table-cell>
          <table:table-cell table:style-name="ce9" office:value-type="string" calcext:value-type="string">
            <text:p>1. Acceder a la página de registro.</text:p>
            <text:p>2. Dejar todos los campos en blanco.</text:p>
            <text:p>3. Hacer clic en el botón “Registrarse”.</text:p>
          </table:table-cell>
          <table:table-cell table:style-name="ce9" office:value-type="string" calcext:value-type="string">
            <text:p>- El sistema muestra un mensaje indicando que no se puede continuar con el registro hasta completar todos los campos requeridos.</text:p>
            <text:p>- Se indica el o los campos vacíos poniendo su borde en color rojo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7">
          <table:table-cell table:style-name="ce9" office:value-type="string" calcext:value-type="string">
            <text:p>LOG_08</text:p>
          </table:table-cell>
          <table:table-cell table:style-name="ce9" office:value-type="string" calcext:value-type="string">
            <text:p>Login de usuario </text:p>
          </table:table-cell>
          <table:table-cell table:style-name="ce9" office:value-type="string" calcext:value-type="string">
            <text:p>Validar comportamiento de logueo cuando se ingresa un usuario existente y una contraseña incorrecta</text:p>
          </table:table-cell>
          <table:table-cell table:style-name="ce9" office:value-type="string" calcext:value-type="string">
            <text:p>- La app debe estar activa  </text:p>
            <text:p>- el usuario pueda acceder al Inicio de sesión.</text:p>
            <text:p>- El usuario debe contar con el nombre de un usuario activo y de una contraseña errónea.</text:p>
          </table:table-cell>
          <table:table-cell table:style-name="ce9" office:value-type="string" calcext:value-type="string">
            <text:p>1. Acceder al menú de “Inicio de Sesión”.</text:p>
            <text:p>2. Ingresar un usuario existente y una contraseña distinta de la utilizada por ese usuario.</text:p>
            <text:p>3. Hacer clic en el botón “Iniciar Sesión”.</text:p>
            <text:p/>
          </table:table-cell>
          <table:table-cell table:style-name="ce9" office:value-type="string" calcext:value-type="string">
            <text:p>- Aparece un mensaje genérico indicando que la contraseña no  es correcta.</text:p>
            <text:p>- Puede aparecer un mensaje preguntando si ha olvidado la contraseña, y ofrecer recuperarla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2">
          <table:table-cell table:style-name="ce9" office:value-type="string" calcext:value-type="string">
            <text:p>LOG_09</text:p>
          </table:table-cell>
          <table:table-cell table:style-name="ce9" office:value-type="string" calcext:value-type="string">
            <text:p>Login de usuario </text:p>
          </table:table-cell>
          <table:table-cell table:style-name="ce9" office:value-type="string" calcext:value-type="string">
            <text:p>Validar comportamiento del sistema cuando se solicita recuperar la contraseña con un correo que no está registrado.</text:p>
          </table:table-cell>
          <table:table-cell table:style-name="ce9" office:value-type="string" calcext:value-type="string">
            <text:p><text:span text:style-name="T2">- a app debe estar activa </text:span></text:p>
            <text:p>- El usuario puede acceder a la página de logueo.  </text:p>
            <text:p>- El <text:span text:style-name="T1">email</text:span> ingresado no debe estar registrado aún .</text:p>
          </table:table-cell>
          <table:table-cell table:style-name="ce9" office:value-type="string" calcext:value-type="string">
            <text:p>1. Acceder al menú de “Inicio de Sesión”. </text:p>
            <text:p>2. Ingresar un email que no esté registrado en el sistema.</text:p>
            <text:p>3. Hacer clic en el link “Recuperar contraseña”. </text:p>
          </table:table-cell>
          <table:table-cell table:style-name="ce9" office:value-type="string" calcext:value-type="string">
            <text:p>- El sistema muestra un mensaje indicando que ese usuario no está registrdo en el sistema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2">
          <table:table-cell table:style-name="ce9" office:value-type="string" calcext:value-type="string">
            <text:p>LOG_10</text:p>
          </table:table-cell>
          <table:table-cell table:style-name="ce9" office:value-type="string" calcext:value-type="string">
            <text:p>Registro de usuario </text:p>
          </table:table-cell>
          <table:table-cell table:style-name="ce9" office:value-type="string" calcext:value-type="string">
            <text:p>Validar comportamiento del sistema cuando un usuario logueado correctamente cierra su sesión y presiona el botón “atrás” del navegador.</text:p>
          </table:table-cell>
          <table:table-cell table:style-name="ce9" office:value-type="string" calcext:value-type="string">
            <text:p>- la app debe estar activa.</text:p>
            <text:p>- El debe tener su sesión abierta correctamente.</text:p>
          </table:table-cell>
          <table:table-cell table:style-name="ce9" office:value-type="string" calcext:value-type="string">
            <text:p>1. Hacer clic en el botón “Cerrar sesión”.</text:p>
            <text:p>2. Hacer clic en el botón “atrás” del navegador.</text:p>
          </table:table-cell>
          <table:table-cell table:style-name="ce9" office:value-type="string" calcext:value-type="string">
            <text:p>- El sistema muestra la pantalla de "Inicio de sesión".</text:p>
          </table:table-cell>
          <table:table-cell table:style-name="ce9" office:value-type="string" calcext:value-type="string">
            <text:p>No ejecutado </text:p>
          </table:table-cell>
        </table:table-row>
        <table:table-row table:style-name="ro1" table:number-rows-repeated="4">
          <table:table-cell table:style-name="ce3" table:number-columns-repeated="7"/>
        </table:table-row>
        <table:table-row table:style-name="ro8" table:number-rows-repeated="1048560">
          <table:table-cell table:number-columns-repeated="7"/>
          <table:table-cell table:style-name="ce7" table:number-columns-repeated="16377"/>
        </table:table-row>
        <table:table-row table:style-name="ro8">
          <table:table-cell table:number-columns-repeated="7"/>
          <table:table-cell table:style-name="ce7" table:number-columns-repeated="16377"/>
        </table:table-row>
      </table:table>
      <table:table table:name="PM_2" table:style-name="ta1">
        <office:forms form:automatic-focus="false" form:apply-design-mode="false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row table:style-name="ro9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ódulo</text:p>
          </table:table-cell>
          <table:table-cell table:style-name="ce8" office:value-type="string" calcext:value-type="string">
            <text:p>Caso de prueba</text:p>
          </table:table-cell>
          <table:table-cell table:style-name="ce8" office:value-type="string" calcext:value-type="string">
            <text:p>Precondiciones</text:p>
          </table:table-cell>
          <table:table-cell table:style-name="ce8" office:value-type="string" calcext:value-type="string">
            <text:p>Datos de prueba</text:p>
          </table:table-cell>
          <table:table-cell table:style-name="ce8" office:value-type="string" calcext:value-type="string">
            <text:p>Pasos</text:p>
          </table:table-cell>
          <table:table-cell table:style-name="ce8" office:value-type="string" calcext:value-type="string">
            <text:p>Resultado esperado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2">
          <table:table-cell office:value-type="string" calcext:value-type="string">
            <text:p>REG_TXT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un campo de texto con limite máximo de caracteres ingresados por teclado (por ejemplo 10 caracteres como máximo).</text:p>
          </table:table-cell>
          <table:table-cell office:value-type="string" calcext:value-type="string">
            <text:p>- La app debe estar activa  </text:p>
            <text:p>- el usuario puede acceder a la pagina </text:p>
          </table:table-cell>
          <table:table-cell table:style-name="ce5"/>
          <table:table-cell office:value-type="string" calcext:value-type="string">
            <text:p>1.Acceder a la página de registro.  </text:p>
            <text:p>2.Completar el campo tipeando una cadena de caracteres mayor a 10 caracteres/signos.</text:p>
          </table:table-cell>
          <table:table-cell office:value-type="string" calcext:value-type="string">
            <text:p>- El campo permite visualizar únicamente los primeros 10 caracteres ingresados e ignora los caracteres adicionales.</text:p>
            <text:p/>
          </table:table-cell>
          <table:table-cell/>
        </table:table-row>
        <table:table-row table:style-name="ro7">
          <table:table-cell office:value-type="string" calcext:value-type="string">
            <text:p>REG_TXT_02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un campo de texto con limite máximo <text:s/>de caracteres ingresados por “pegado” o “copy-paste” <text:s/>(por ejemplo 10 caracteres como máximo).</text:p>
          </table:table-cell>
          <table:table-cell office:value-type="string" calcext:value-type="string">
            <text:p>- La app debe estar activa  </text:p>
            <text:p>- el usuario puede acceder a la pagina </text:p>
          </table:table-cell>
          <table:table-cell table:style-name="ce5"/>
          <table:table-cell office:value-type="string" calcext:value-type="string">
            <text:p>1.Acceder a la página de registro. </text:p>
            <text:p>2.Completar el campo pegando una cadena de caracteres mayor a 10 caracteres/signos.</text:p>
          </table:table-cell>
          <table:table-cell office:value-type="string" calcext:value-type="string">
            <text:p>El sistema impide que se ingresen más de 10 caracteres mediante pegado. El campo no supera el límite definido.</text:p>
          </table:table-cell>
          <table:table-cell/>
        </table:table-row>
        <table:table-row table:style-name="ro10">
          <table:table-cell office:value-type="string" calcext:value-type="string">
            <text:p>REG_NUM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un campo numérico exclusivo. </text:p>
            <text:p>Asumiendo que al presionar el botón “Registrarse”, el sistema valida los datos ingresados.</text:p>
          </table:table-cell>
          <table:table-cell office:value-type="string" calcext:value-type="string">
            <text:p>- La app debe estar activa</text:p>
            <text:p>- el usuario puede acceder a la pagina </text:p>
            <text:p><text:span text:style-name="T2">- El campo numérico se encuentra visible y habilitado para edición.</text:span></text:p>
          </table:table-cell>
          <table:table-cell table:style-name="ce5"/>
          <table:table-cell office:value-type="string" calcext:value-type="string">
            <text:p>1.Acceder a la página de registro. </text:p>
            <text:p>2.Completar el campo tipeando una cadena de caracteres y/o signos.</text:p>
            <text:p>3. Completar el resto de los campos del registro.</text:p>
            <text:p>4. Presionar el botón “Registrarse”</text:p>
          </table:table-cell>
          <table:table-cell office:value-type="string" calcext:value-type="string">
            <text:p>Al presionar el botón “Registrarse”, si el valor ingresado en el campo numérico es inválido, el sistema:  </text:p>
            <text:p>marca el campo de forma visible (por ejemplo, en color rojo)  </text:p>
            <text:p>muestra un mensaje de error claro indicando que el campo solo admite valores numéricos  </text:p>
            <text:p>No permite continuar con el envío del formulario</text:p>
          </table:table-cell>
          <table:table-cell/>
        </table:table-row>
        <table:table-row table:style-name="ro6">
          <table:table-cell office:value-type="string" calcext:value-type="string">
            <text:p>REG_NUM_02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ingreso de formatos numéricos no válidos en campo numérico</text:p>
          </table:table-cell>
          <table:table-cell office:value-type="string" calcext:value-type="string">
            <text:p>- La app debe estar activa </text:p>
            <text:p>- el usuario pueda acceder a la pagina </text:p>
            <text:p>- El campo numérico se encuentra visible y habilitado para edición.</text:p>
          </table:table-cell>
          <table:table-cell table:style-name="ce6" office:value-type="float" office:value="1200000" calcext:value-type="float">
            <text:p>1,20E+06</text:p>
          </table:table-cell>
          <table:table-cell office:value-type="string" calcext:value-type="string">
            <text:p>1.Acceder a la página de registro.  </text:p>
            <text:p>2.Completar el campo tipeando el dato de prueba.</text:p>
          </table:table-cell>
          <table:table-cell office:value-type="string" calcext:value-type="string">
            <text:p>- El sistema no acepta el valor ingresado “1,20E+06” en el campo numérico. </text:p>
            <text:p>- El campo se marca de forma visible como inválido (por ejemplo, resaltado en rojo) y se muestra un mensaje de error indicando que el formato ingresado no es válido y que el campo solo admite valores numéricos permitidos. </text:p>
            <text:p>- El formulario no permite continuar con el envío hasta que el error sea corregido.</text:p>
            <text:p>- El valor inválido no debe persistir luego de corregido el error.</text:p>
          </table:table-cell>
          <table:table-cell/>
        </table:table-row>
        <table:table-row table:style-name="ro6">
          <table:table-cell office:value-type="string" calcext:value-type="string">
            <text:p>REG_NUM_03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que el campo numérico no acepta letras. </text:p>
          </table:table-cell>
          <table:table-cell office:value-type="string" calcext:value-type="string">
            <text:p>- La app debe estar activa </text:p>
            <text:p>- el usuario pueda acceder a la pagina </text:p>
            <text:p>- El campo numérico se encuentra visible y habilitado para edición.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1.Acceder a la página de registro.  </text:p>
            <text:p>2.Completar el campo tipeando el dato de prueba.</text:p>
          </table:table-cell>
          <table:table-cell office:value-type="string" calcext:value-type="string">
            <text:p>- El sistema no acepta el valor ingresado “e” en el campo numérico. </text:p>
            <text:p>- El campo se marca de forma visible como inválido (por ejemplo, resaltado en rojo) y se muestra un mensaje de error indicando que el formato ingresado no es válido y que el campo solo admite valores numéricos permitidos. </text:p>
            <text:p>- El formulario no permite continuar con el envío hasta que el error sea corregido.</text:p>
            <text:p>- El valor inválido no debe persistir luego de corregido el error.</text:p>
          </table:table-cell>
          <table:table-cell/>
        </table:table-row>
        <table:table-row table:style-name="ro6">
          <table:table-cell office:value-type="string" calcext:value-type="string">
            <text:p>REG_NUM_04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que el <text:s/>campo numérico no acepta símbolos aritméticos.</text:p>
          </table:table-cell>
          <table:table-cell office:value-type="string" calcext:value-type="string">
            <text:p>- La app debe estar activa </text:p>
            <text:p>- el usuario pueda acceder a la pagina </text:p>
            <text:p>- El campo numérico se encuentra visible y habilitado para edición.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1.Acceder a la página de registro.  </text:p>
            <text:p>2.Completar el campo tipeando el dato de prueba.</text:p>
          </table:table-cell>
          <table:table-cell office:value-type="string" calcext:value-type="string">
            <text:p>- El sistema no acepta el valor ingresado “-” en el campo numérico. </text:p>
            <text:p>- El campo se marca de forma visible como inválido (por ejemplo, resaltado en rojo) y se muestra un mensaje de error indicando que el formato ingresado no es válido y que el campo solo admite valores numéricos permitidos. </text:p>
            <text:p>- El formulario no permite continuar con el envío hasta que el error sea corregido.</text:p>
            <text:p>- El valor inválido no debe persistir luego de corregido el error.</text:p>
          </table:table-cell>
          <table:table-cell/>
        </table:table-row>
        <table:table-row table:style-name="ro6">
          <table:table-cell office:value-type="string" calcext:value-type="string">
            <text:p>REG_NUM_05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que el campo numérico no acepte separadores. </text:p>
          </table:table-cell>
          <table:table-cell office:value-type="string" calcext:value-type="string">
            <text:p>- La app debe estar activa </text:p>
            <text:p>- el usuario pueda acceder a la pagina </text:p>
            <text:p>- El campo numérico se encuentra visible y habilitado para edición.</text:p>
          </table:table-cell>
          <table:table-cell table:style-name="ce14" office:value-type="string" calcext:value-type="string">
            <text:p>,</text:p>
          </table:table-cell>
          <table:table-cell office:value-type="string" calcext:value-type="string">
            <text:p>1.Acceder a la página de registro.  </text:p>
            <text:p>2.Completar el campo tipeando el dato de prueba.</text:p>
          </table:table-cell>
          <table:table-cell office:value-type="string" calcext:value-type="string">
            <text:p>- El sistema no acepta el valor ingresado “,” en el campo numérico. </text:p>
            <text:p>- El campo se marca de forma visible como inválido (por ejemplo, resaltado en rojo) y se muestra un mensaje de error indicando que el formato ingresado no es válido y que el campo solo admite valores numéricos permitidos. </text:p>
            <text:p>- El formulario no permite continuar con el envío hasta que el error sea corregido.</text:p>
            <text:p>- El valor inválido no debe persistir luego de corregido el error.</text:p>
          </table:table-cell>
          <table:table-cell/>
        </table:table-row>
        <table:table-row table:style-name="ro7">
          <table:table-cell office:value-type="string" calcext:value-type="string">
            <text:p>NAV_INI_01 </text:p>
          </table:table-cell>
          <table:table-cell office:value-type="string" calcext:value-type="string">
            <text:p>Navegación</text:p>
          </table:table-cell>
          <table:table-cell office:value-type="string" calcext:value-type="string">
            <text:p>Validar navegación desde menú a sección Inicio.</text:p>
            <text:p>- Se asume un menú de navegación con las opciones: Inicio, Servicios, Contacto</text:p>
          </table:table-cell>
          <table:table-cell office:value-type="string" calcext:value-type="string">
            <text:p>- la app debe estar activa</text:p>
            <text:p>- el usuario puede acceder a la página principal</text:p>
          </table:table-cell>
          <table:table-cell/>
          <table:table-cell office:value-type="string" calcext:value-type="string">
            <text:p>1. Acceder a la página principal.</text:p>
            <text:p>2. Posicionar el puntero del mouse en el menú y hacer clic en la opción “Inicio”.</text:p>
          </table:table-cell>
          <table:table-cell office:value-type="string" calcext:value-type="string">
            <text:p>-el usuario queda visualmente posicionado en el comienzo de la sección "Inicio", de la página principal o Home.</text:p>
          </table:table-cell>
          <table:table-cell/>
        </table:table-row>
        <table:table-row table:style-name="ro7">
          <table:table-cell office:value-type="string" calcext:value-type="string">
            <text:p>NAV_INI_02</text:p>
          </table:table-cell>
          <table:table-cell office:value-type="string" calcext:value-type="string">
            <text:p>Navegación</text:p>
          </table:table-cell>
          <table:table-cell office:value-type="string" calcext:value-type="string">
            <text:p>Validar navegación desde menú a sección Servicios.</text:p>
            <text:p>- Se asume un menú de navegación con las opciones: Inicio, Servicios, Contacto</text:p>
          </table:table-cell>
          <table:table-cell office:value-type="string" calcext:value-type="string">
            <text:p>- la app debe estar activa</text:p>
            <text:p>- el usuario puede acceder a la página principal</text:p>
            <text:p/>
          </table:table-cell>
          <table:table-cell/>
          <table:table-cell office:value-type="string" calcext:value-type="string">
            <text:p>1. Acceder a la página principal.</text:p>
            <text:p>2. Posicionar el puntero del mouse en el menú y hacer clic en la opción “Servicios”.</text:p>
          </table:table-cell>
          <table:table-cell office:value-type="string" calcext:value-type="string">
            <text:p><text:span text:style-name="T2">-el usuario queda visualmente posicionado en el comienzo de la sección "Servicios", de la página principal o Home</text:span>.</text:p>
          </table:table-cell>
          <table:table-cell/>
        </table:table-row>
        <table:table-row table:style-name="ro7">
          <table:table-cell office:value-type="string" calcext:value-type="string">
            <text:p>NAV_INI_03</text:p>
          </table:table-cell>
          <table:table-cell office:value-type="string" calcext:value-type="string">
            <text:p>Navegación</text:p>
          </table:table-cell>
          <table:table-cell office:value-type="string" calcext:value-type="string">
            <text:p>Validar navegación desde menú a sección Contacto.</text:p>
            <text:p>- Se asume un menú de navegación con las opciones: Inicio, Servicios, Contacto</text:p>
          </table:table-cell>
          <table:table-cell office:value-type="string" calcext:value-type="string">
            <text:p>- la app debe estar activa</text:p>
            <text:p>- el usuario puede acceder a la página principal</text:p>
            <text:p/>
          </table:table-cell>
          <table:table-cell/>
          <table:table-cell office:value-type="string" calcext:value-type="string">
            <text:p>1. Acceder a la página principal.</text:p>
            <text:p>2. Posicionar el puntero del mouse en el menú hacer clic en la opción “Inicio”.</text:p>
          </table:table-cell>
          <table:table-cell office:value-type="string" calcext:value-type="string">
            <text:p><text:span text:style-name="T2">-el usuario queda visualmente posicionado en el comienzo de la sección "Contacto", de la página principal o Home</text:span>.</text:p>
          </table:table-cell>
          <table:table-cell/>
        </table:table-row>
        <table:table-row table:style-name="ro7">
          <table:table-cell office:value-type="string" calcext:value-type="string">
            <text:p>REG_BUT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- Validar envío de formulario con campos obligatorios vacíos</text:p>
            <text:p/>
          </table:table-cell>
          <table:table-cell office:value-type="string" calcext:value-type="string">
            <text:p>- la app debe estar activa</text:p>
            <text:p>- el usuario puede acceder a la página  del formulario.</text:p>
            <text:p>- Existen campos obligatorios en el formulario.</text:p>
          </table:table-cell>
          <table:table-cell office:value-type="string" calcext:value-type="string">
            <text:p>Campos obligatorios vacíos.</text:p>
          </table:table-cell>
          <table:table-cell office:value-type="string" calcext:value-type="string">
            <text:p>1. Acceder a la página del formulario.</text:p>
            <text:p>2. Dejar los campos obligatorios vacíos.</text:p>
            <text:p>3. Presionar el botón “Registrarse”.</text:p>
          </table:table-cell>
          <table:table-cell office:value-type="string" calcext:value-type="string">
            <text:p>- El sistema no envía el formulario. </text:p>
            <text:p>- Se muestran mensajes de error indicando los campos obligatorios. </text:p>
            <text:p>- Los campos inválidos se marcan visualmente (por ejemplo, en rojo). </text:p>
            <text:p>- El usuario permanece en la misma página.</text:p>
          </table:table-cell>
          <table:table-cell/>
        </table:table-row>
        <table:table-row table:style-name="ro2">
          <table:table-cell office:value-type="string" calcext:value-type="string">
            <text:p>FIND_BUT_02</text:p>
          </table:table-cell>
          <table:table-cell office:value-type="string" calcext:value-type="string">
            <text:p>Búsqueda</text:p>
          </table:table-cell>
          <table:table-cell office:value-type="string" calcext:value-type="string">
            <text:p>- Validar que el botón “Buscar” permanezca deshabilitado cuando no se ingresan criterios de búsqueda</text:p>
          </table:table-cell>
          <table:table-cell office:value-type="string" calcext:value-type="string">
            <text:p>- la app debe estar activa</text:p>
            <text:p>- el usuario puede acceder a la página  principal.</text:p>
            <text:p>- El formulario de búsqueda se encuentra visible.</text:p>
          </table:table-cell>
          <table:table-cell office:value-type="string" calcext:value-type="string">
            <text:p>Campos de búsqueda vacíos.</text:p>
          </table:table-cell>
          <table:table-cell office:value-type="string" calcext:value-type="string">
            <text:p>1. Acceder a la página principal.</text:p>
            <text:p>2. Acceder al menú de búsqueda.</text:p>
            <text:p>3. Dejar el / los campos de búsqueda vacíos.</text:p>
          </table:table-cell>
          <table:table-cell office:value-type="string" calcext:value-type="string">
            <text:p>- El botón “Buscar” permanece deshabilitado. </text:p>
            <text:p>- No se ejecuta ninguna acción de búsqueda.</text:p>
          </table:table-cell>
          <table:table-cell/>
        </table:table-row>
        <table:table-row table:style-name="ro11">
          <table:table-cell office:value-type="string" calcext:value-type="string">
            <text:p>REG_PERS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- Validar la persistencia de datos en un formulario. (Asumiendo que no hay persistencia)</text:p>
          </table:table-cell>
          <table:table-cell office:value-type="string" calcext:value-type="string">
            <text:p>- La app debe estar activa.</text:p>
            <text:p>- El usuario puede acceder a la pagina del formulario.</text:p>
            <text:p/>
          </table:table-cell>
          <table:table-cell/>
          <table:table-cell office:value-type="string" calcext:value-type="string">
            <text:p>1. Acceder a la página del formulario. </text:p>
            <text:p>2. Completar  los campos del formulario. </text:p>
            <text:p>3. Presionar el botón “Actualizar” del navegador.</text:p>
          </table:table-cell>
          <table:table-cell office:value-type="string" calcext:value-type="string">
            <text:p>- Al recargar la página, los datos ingresados en el formulario se pierden. </text:p>
            <text:p>- El formulario se muestra vacío en su estado inicial.</text:p>
          </table:table-cell>
          <table:table-cell/>
        </table:table-row>
        <table:table-row table:style-name="ro10">
          <table:table-cell office:value-type="string" calcext:value-type="string">
            <text:p>REG_RESPONS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visualización y usabilidad de la pantalla en diferentes resoluciones (desktop y mobile).</text:p>
          </table:table-cell>
          <table:table-cell office:value-type="string" calcext:value-type="string">
            <text:p>- La app está activa.  </text:p>
            <text:p>- El usuario puede acceder a la pantalla a probar.  </text:p>
            <text:p>- El navegador permite cambiar a modo responsive.</text:p>
          </table:table-cell>
          <table:table-cell office:value-type="string" calcext:value-type="string">
            <text:p>- Desktop: 1366×768  </text:p>
            <text:p>- Mobile: 375×667</text:p>
          </table:table-cell>
          <table:table-cell office:value-type="string" calcext:value-type="string">
            <text:p>1. Acceder a la pantalla en modo desktop.  </text:p>
            <text:p>2. Verificar la correcta visualización de los elementos.  </text:p>
            <text:p>3. Cambiar a modo responsive (mobile) desde el navegador.  </text:p>
            <text:p>4. Verificar la disposición de los elementos en mobile.</text:p>
          </table:table-cell>
          <table:table-cell office:value-type="string" calcext:value-type="string">
            <text:p>- En desktop, la pantalla se visualiza correctamente sin superposición de elementos. </text:p>
            <text:p>- En mobile, los elementos se adaptan al tamaño de pantalla. </text:p>
            <text:p>- El texto es legible y los botones son utilizables. </text:p>
            <text:p>- No se ocultan elementos funcionales necesarios para completar el registro.</text:p>
          </table:table-cell>
          <table:table-cell/>
        </table:table-row>
        <table:table-row table:style-name="ro12">
          <table:table-cell office:value-type="string" calcext:value-type="string">
            <text:p>REG_RTAS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la calidad de mensajes al usuario</text:p>
          </table:table-cell>
          <table:table-cell office:value-type="string" calcext:value-type="string">
            <text:p>- la app debe estar activa</text:p>
            <text:p>- el usuario puede acceder a la página principal.</text:p>
          </table:table-cell>
          <table:table-cell/>
          <table:table-cell office:value-type="string" calcext:value-type="string">
            <text:p>1. Acceder a la página del formulario. </text:p>
            <text:p>2. Dejar algún campo obligatorio vacío. </text:p>
            <text:p>3. Completar un campo de texto con valores no admitidos. </text:p>
            <text:p>4. Completar un campo numérico con datos no admitidos.</text:p>
            <text:p>5. Presionar el botón “Registrarse”.</text:p>
          </table:table-cell>
          <table:table-cell office:value-type="string" calcext:value-type="string">
            <text:p>- El sistema no envía el formulario. </text:p>
            <text:p>- Se muestran mensajes de error indicando los campos obligatorios. </text:p>
            <text:p>- Los campos inválidos se marcan visualmente (por ejemplo, en rojo  y debajo del campo se muestra un modelo de cómo ingresar el dato). </text:p>
            <text:p>- El usuario permanece en la misma página.</text:p>
            <text:p>- Aparece un mensaje indicando que para enviar el formulario todos los datos deben coincidir con los requerimientos expresados en el formulario.</text:p>
            <text:p>- Aparece habilitado el botón “cancelar envío”</text:p>
          </table:table-cell>
          <table:table-cell/>
        </table:table-row>
        <table:table-row table:style-name="ro7">
          <table:table-cell office:value-type="string" calcext:value-type="string">
            <text:p>REG_RTAS_02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la calidad de mensajes al usuario</text:p>
          </table:table-cell>
          <table:table-cell office:value-type="string" calcext:value-type="string">
            <text:p>- la app debe estar activa</text:p>
            <text:p>- el usuario puede acceder a la página principal.</text:p>
          </table:table-cell>
          <table:table-cell/>
          <table:table-cell office:value-type="string" calcext:value-type="string">
            <text:p>1. Acceder a la página del formulario.</text:p>
            <text:p>2. Completar todos los campos los campos del formulario correctamente.</text:p>
            <text:p>3. Presionar el botón “Registrarse”.</text:p>
          </table:table-cell>
          <table:table-cell office:value-type="string" calcext:value-type="string">
            <text:p>- El sistema realiza el envío del formulario.</text:p>
            <text:p>- Aparece un mensaje confirmando el envío de los datos.</text:p>
          </table:table-cell>
          <table:table-cell/>
        </table:table-row>
        <table:table-row table:style-name="ro5">
          <table:table-cell office:value-type="string" calcext:value-type="string">
            <text:p>REG_MENS_USER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estado inicial de la pantalla de registro.</text:p>
          </table:table-cell>
          <table:table-cell office:value-type="string" calcext:value-type="string">
            <text:p>- la app debe estar activa</text:p>
            <text:p>- el usuario puede acceder a la página principal.</text:p>
          </table:table-cell>
          <table:table-cell/>
          <table:table-cell office:value-type="string" calcext:value-type="string">
            <text:p>1. Acceder a la página del formulario.</text:p>
          </table:table-cell>
          <table:table-cell office:value-type="string" calcext:value-type="string">
            <text:p>- No se muestran mensajes de error al cargar la pantalla.  </text:p>
            <text:p>- No se muestran mensajes informativos iniciales.  </text:p>
            <text:p>- Los campos se presentan vacíos.</text:p>
            <text:p>- El campo “Fecha de Nacimiento” se muestra vacío con indicación de formato.</text:p>
            <text:p>- El botón “Registrarse” aparece habilitado.</text:p>
            <text:p>- El botón “Cancelar” aparece deshabilitado.</text:p>
          </table:table-cell>
          <table:table-cell/>
        </table:table-row>
        <table:table-row table:style-name="ro5">
          <table:table-cell office:value-type="string" calcext:value-type="string">
            <text:p>REG_FLOW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comportamiento del formulario con acciones interrumpidas</text:p>
          </table:table-cell>
          <table:table-cell office:value-type="string" calcext:value-type="string">
            <text:p>- la app debe estar activa.</text:p>
            <text:p>- el usuario puede acceder a la página de “Registro”.</text:p>
            <text:p>- El formulario se muestra en condiciones correctas para ser completado.</text:p>
          </table:table-cell>
          <table:table-cell/>
          <table:table-cell office:value-type="string" calcext:value-type="string">
            <text:p>1. Acceder a la página del formulario.  </text:p>
            <text:p>2. Completar  algunos campos del formulario de registro.</text:p>
            <text:p>3. Cerrar la pestaña antes de completar y/o enviar el formulario.</text:p>
            <text:p>4. Volver a entrar a la página de “Registro”.</text:p>
          </table:table-cell>
          <table:table-cell office:value-type="string" calcext:value-type="string">
            <text:p>- No se conservan datos ingresados previamente.  </text:p>
            <text:p>- El formulario se presenta en su estado inicial.</text:p>
            <text:p>- Muestra todos los campos y botones en condiciones correctas para ser completado.</text:p>
            <text:p>- No se muestran mensajes de error ni advertencias relacionadas con la sesión anterior.</text:p>
          </table:table-cell>
          <table:table-cell/>
        </table:table-row>
        <table:table-row table:style-name="ro13">
          <table:table-cell office:value-type="string" calcext:value-type="string">
            <text:p>REG_ERR_01</text:p>
          </table:table-cell>
          <table:table-cell office:value-type="string" calcext:value-type="string">
            <text:p>Registro de usuario </text:p>
          </table:table-cell>
          <table:table-cell office:value-type="string" calcext:value-type="string">
            <text:p>Validar el comportamiento del formulario con más de un campo inválido</text:p>
          </table:table-cell>
          <table:table-cell office:value-type="string" calcext:value-type="string">
            <text:p>- la app debe estar activa.</text:p>
            <text:p>- el usuario puede acceder a la página de “Registro”.</text:p>
            <text:p>- El formulario se muestra en condiciones correctas para ser completado.</text:p>
          </table:table-cell>
          <table:table-cell/>
          <table:table-cell office:value-type="string" calcext:value-type="string">
            <text:p>1. Acceder a la página del formulario.  </text:p>
            <text:p>2. Dejar algún campo obligatorio vacío.  </text:p>
            <text:p>3. Completar un campo de texto con valores no admitidos.  </text:p>
            <text:p>4. Completar un campo numérico con datos no admitidos. </text:p>
            <text:p>5. Presionar el botón “Registrarse”.</text:p>
          </table:table-cell>
          <table:table-cell office:value-type="string" calcext:value-type="string">
            <text:p>- Se muestran mensajes de error para todos los campos inválidos detectados.</text:p>
            <text:p>- El sistema no envía el formulario. </text:p>
            <text:p>- Se muestran mensajes de error indicando cada  campo obligatorio. </text:p>
            <text:p>- Los campos inválidos se marcan visualmente (por ejemplo, en rojo  y debajo de cada campo se muestra un modelo de cómo ingresar el dato). </text:p>
            <text:p>- El usuario permanece en la misma página.</text:p>
            <text:p>- Aparece un mensaje indicando que para enviar el formulario todos los datos deben coincidir con los requerimientos expresados en el formulario.</text:p>
            <text:p>- Aparece habilitado el botón “cancelar envío”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3" table:style-name="ta1">
        <table:table-column table:style-name="co1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0:58:45.26013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2:09:46.222882700</meta:creation-date>
    <dc:date>2026-02-03T12:45:27.718729200</dc:date>
    <meta:editing-duration>PT3H39M29S</meta:editing-duration>
    <meta:editing-cycles>23</meta:editing-cycles>
    <meta:generator>LibreOffice/25.2.7.2$Windows_X86_64 LibreOffice_project/5cbfd1ab6520636bb5f7b99185aa69bd7456825d</meta:generator>
    <meta:document-statistic meta:table-count="3" meta:cell-count="206" meta:object-count="0"/>
  </office:meta>
</office:document-meta>
</file>